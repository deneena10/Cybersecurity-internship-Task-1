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ASK 1</text:p>
      <text:p text:style-name="Normal">OBJECTIVE : Learn to discover open ports on devices in your local network to understand network exposure.</text:p>
      <text:p text:style-name="Normal">TOOLS USED : Nmap ,Wireshark ,Command prompt</text:p>
      <text:p text:style-name="Normal">In this task I performed a comprehensive network reconnaissance scan on a local Windows 11 target host (192.168.1.35) using Nmap and Zenmap GUI.<text:s/></text:p>
      <text:p text:style-name="Normal">By executing a TCP SYN scan ,service version detection, and aggressive script scanning I successfully mapped out the host’s network exposure.</text:p>
      <text:p text:style-name="Normal">I identified 4 open ports including: active windows networking services (MSRPC on port 135, NetBIOS on port 139 and SMBv3 on port 445)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neena .</meta:initial-creator>
    <dc:creator>Deneena .</dc:creator>
    <meta:creation-date>2026-06-29T09:46:00Z</meta:creation-date>
    <dc:date>2026-06-29T09:57:00Z</dc:date>
    <meta:template xlink:href="Normal.dotm" xlink:type="simple"/>
    <meta:editing-cycles>1</meta:editing-cycles>
    <meta:editing-duration>PT660S</meta:editing-duration>
    <meta:document-statistic meta:page-count="1" meta:paragraph-count="1" meta:word-count="87" meta:character-count="582" meta:row-count="4" meta:non-whitespace-character-count="496"/>
  </office:meta>
</office:document-meta>
</file>